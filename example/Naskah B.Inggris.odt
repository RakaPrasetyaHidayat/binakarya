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127ced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27ced" officeooo:paragraph-rsid="00127ced" style:font-size-asian="12pt" style:font-size-complex="12pt"/>
    </style:style>
    <style:style style:name="P3" style:family="paragraph" style:parent-style-name="Standard">
      <style:text-properties style:font-name="Times New Roman" fo:font-size="12pt" officeooo:rsid="00127ced" officeooo:paragraph-rsid="00127ced" style:font-size-asian="12pt" style:font-size-complex="12pt"/>
    </style:style>
    <style:style style:name="P4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line-height="150%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 style:list-style-name="L1">
      <style:paragraph-properties fo:line-height="150%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line-height="150%"/>
      <style:text-properties style:font-name="Times New Roman" fo:font-size="12pt" fo:font-weight="bold" style:font-size-asian="12pt" style:font-size-complex="12pt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skah Bahasa Inggris oleh</text:p>
      <text:p text:style-name="P2">Raka Prasetya Hidayat </text:p>
      <text:p text:style-name="P2">12 RPL 2</text:p>
      <text:p text:style-name="P2">10232096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soft-page-break/>Characters:</text:p>
      <text:list text:style-name="L1">
        <text:list-item>
          <text:p text:style-name="P6"><text:span text:style-name="T1">Interviewer</text:span> (HRD Manager)</text:p>
        </text:list-item>
        <text:list-item>
          <text:p text:style-name="P6"><text:span text:style-name="T1">Interviewee</text:span> (Job Applicant)</text:p>
        </text:list-item>
      </text:list>
      <text:p text:style-name="P4"><text:span text:style-name="T1"/></text:p>
      <text:p text:style-name="P5">[OPENING]</text:p>
      <text:p text:style-name="P4"><text:span text:style-name="T1">Interviewer:</text:span> "Good morning. Please, have a seat. How are you doing today?"</text:p>
      <text:p text:style-name="P4"><text:span text:style-name="T1">Interviewee:</text:span> "Good morning, Sir/Madam. I am doing very well, thank you. I appreciate the opportunity to be interviewed today."</text:p>
      <text:p text:style-name="P4"><text:span text:style-name="T1">Interviewer:</text:span> "Great, let’s get started. Could you please introduce yourself?"</text:p>
      <text:p text:style-name="P5">[MAIN CONTENT]</text:p>
      <text:p text:style-name="P4"><text:span text:style-name="T1">1. Personal Identity</text:span> <text:span text:style-name="T1">Interviewee:</text:span> "Certainly. My name is [Your Name], and I am a graduate of SMKN 1 Majalengka majoring in Software Development. I have a deep passion for technology, specifically in web development and UI/UX design. I consider myself a disciplined individual who is always eager to learn new things in the tech industry."</text:p>
      <text:p text:style-name="P4"><text:span text:style-name="T1">2. Strengths and Weaknesses</text:span> <text:span text:style-name="T1">Interviewer:</text:span> "What do you consider to be your greatest strengths and weaknesses?"</text:p>
      <text:p text:style-name="P4"><text:span text:style-name="T1">Interviewee:</text:span> "My strength is my technical ability in frontend and backend development. I am also accustomed to working both independently and in a team to finish projects on time. My weakness is that I can be too detail-oriented, which sometimes takes more time, but I manage this by setting priorities and improving my time management."</text:p>
      <text:p text:style-name="P4"><text:span text:style-name="T1">3. Internship Experience (PKL)</text:span> <text:span text:style-name="T1">Interviewer:</text:span> "Can you tell me about your internship experience?"</text:p>
      <text:p text:style-name="P4"><text:span text:style-name="T1">Interviewee:</text:span> "During my internship, I was involved in developing digital reporting and documentation systems. I learned how to manage real-world databases and collaborated with industry professionals to compile systematic technical reports. This experience sharpened both my technical skills and professional communication."</text:p>
      <text:p text:style-name="P4"><text:span text:style-name="T1">4. Reason for Applying</text:span> <text:span text:style-name="T1">Interviewer:</text:span> "Why are you interested in applying for this position at our company?"</text:p>
      <text:p text:style-name="P4"><text:soft-page-break/><text:span text:style-name="T1">Interviewee:</text:span> "This company is well-known for its digital innovation. I want to contribute to the major projects here, and I am confident that my system development skills can add value to the operational efficiency of this company."</text:p>
      <text:p text:style-name="P4"><text:span text:style-name="T1">5. Planning When Hired</text:span> <text:span text:style-name="T1">Interviewer:</text:span> "What will you do if we hire you?"</text:p>
      <text:p text:style-name="P4"><text:span text:style-name="T1">Interviewee:</text:span> "My first step will be to quickly adapt to the work culture and the system workflow here. I will focus on providing creative solutions for every technical challenge. In the long term, I plan to help the company develop platforms that are more secure and user-friendly."</text:p>
      <text:p text:style-name="P5">[CLOSING]</text:p>
      <text:p text:style-name="P4"><text:span text:style-name="T1">Interviewer:</text:span> "Very well. I think that covers everything for today. Do you have any questions?"</text:p>
      <text:p text:style-name="P4"><text:span text:style-name="T1">Interviewee:</text:span> "Thank you, Sir/Madam. Everything is quite clear. I really hope to join your team. I look forward to hearing from you."</text:p>
      <text:p text:style-name="P4"><text:span text:style-name="T1">Interviewer:</text:span> "Alright, we will contact you soon. Thank you for coming."</text:p>
      <text:p text:style-name="P4"><text:span text:style-name="T1">Interviewee:</text:span> "Thank you, Sir/Madam." (Shake hands and leave the room)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22:10:01.680005184</meta:creation-date>
    <dc:date>2026-03-04T22:13:32.349532508</dc:date>
    <meta:editing-duration>PT3M3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26" meta:word-count="417" meta:character-count="2701" meta:non-whitespace-character-count="2311"/>
  </office:meta>
</office:document-meta>
</file>