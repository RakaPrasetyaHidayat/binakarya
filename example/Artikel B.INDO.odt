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E1FD6B92A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line-height="150%" fo:text-align="center" style:justify-single-word="false"/>
      <style:text-properties fo:font-size="12pt" fo:font-weight="normal" officeooo:rsid="002ece36" officeooo:paragraph-rsid="002e2741" style:font-size-asian="12pt" style:font-weight-asian="normal" style:font-size-complex="12pt" style:font-weight-complex="normal"/>
    </style:style>
    <style:style style:name="P2" style:family="paragraph" style:parent-style-name="Standard">
      <style:paragraph-properties fo:line-height="150%"/>
      <style:text-properties style:font-name="Arial" fo:font-size="14pt" fo:font-weight="bold" style:font-size-asian="14pt" style:font-weight-asian="bold" style:font-size-complex="14pt" style:font-weight-complex="bold"/>
    </style:style>
    <style:style style:name="P3" style:family="paragraph" style:parent-style-name="Standard">
      <style:paragraph-properties fo:line-height="150%" fo:text-align="start" style:justify-single-word="false"/>
      <style:text-properties style:font-name="Arial" fo:font-size="14pt" fo:font-weight="bold" officeooo:rsid="001c0823" officeooo:paragraph-rsid="001b06f3" style:font-size-asian="14pt" style:font-weight-asian="bold" style:font-size-complex="14pt" style:font-weight-complex="bold"/>
    </style:style>
    <style:style style:name="P4" style:family="paragraph" style:parent-style-name="Standard">
      <style:paragraph-properties fo:line-height="150%" fo:text-align="center" style:justify-single-word="false"/>
      <style:text-properties style:font-name="Arial" fo:font-size="14pt" fo:font-weight="bold" officeooo:rsid="001e0359" officeooo:paragraph-rsid="001e0359" style:font-size-asian="14pt" style:font-weight-asian="bold" style:font-size-complex="14pt" style:font-weight-complex="bold"/>
    </style:style>
    <style:style style:name="P5" style:family="paragraph" style:parent-style-name="Standard">
      <style:paragraph-properties fo:line-height="150%"/>
      <style:text-properties style:font-name="Arial" fo:font-size="21pt" style:font-size-asian="21pt" style:font-size-complex="21pt"/>
    </style:style>
    <style:style style:name="P6" style:family="paragraph" style:parent-style-name="Standard">
      <style:paragraph-properties fo:line-height="150%"/>
      <style:text-properties style:font-name="Arial" fo:font-size="12pt" fo:font-weight="bold" officeooo:rsid="00137b26" style:font-size-asian="12pt" style:font-weight-asian="bold" style:font-size-complex="12pt" style:font-weight-complex="bold"/>
    </style:style>
    <style:style style:name="P7" style:family="paragraph" style:parent-style-name="Standard">
      <style:paragraph-properties fo:line-height="150%"/>
      <style:text-properties style:font-name="Arial" fo:font-size="12pt" fo:font-weight="bold" officeooo:rsid="00137b26" officeooo:paragraph-rsid="00137b26" style:font-size-asian="12pt" style:font-weight-asian="bold" style:font-size-complex="12pt" style:font-weight-complex="bold"/>
    </style:style>
    <style:style style:name="P8" style:family="paragraph" style:parent-style-name="Standard">
      <style:paragraph-properties fo:line-height="150%"/>
      <style:text-properties style:font-name="Arial" fo:font-size="12pt" fo:font-weight="bold" officeooo:rsid="0015077f" officeooo:paragraph-rsid="0015077f" style:font-size-asian="12pt" style:font-weight-asian="bold" style:font-size-complex="12pt" style:font-weight-complex="bold"/>
    </style:style>
    <style:style style:name="P9" style:family="paragraph" style:parent-style-name="Standard">
      <style:paragraph-properties fo:line-height="150%" fo:text-align="start" style:justify-single-word="false"/>
      <style:text-properties style:font-name="Arial" fo:font-size="12pt" fo:font-weight="bold" officeooo:rsid="001c0823" officeooo:paragraph-rsid="001c0823" style:font-size-asian="12pt" style:font-weight-asian="bold" style:font-size-complex="12pt" style:font-weight-complex="bold"/>
    </style:style>
    <style:style style:name="P10" style:family="paragraph" style:parent-style-name="Standard">
      <style:paragraph-properties fo:line-height="150%" fo:text-align="start" style:justify-single-word="false"/>
      <style:text-properties style:font-name="Arial" fo:font-size="12pt" fo:font-weight="bold" officeooo:rsid="001d78bf" officeooo:paragraph-rsid="001d78bf" style:font-size-asian="12pt" style:font-weight-asian="bold" style:font-size-complex="12pt" style:font-weight-complex="bold"/>
    </style:style>
    <style:style style:name="P11" style:family="paragraph" style:parent-style-name="Standard">
      <style:paragraph-properties fo:line-height="150%" fo:text-align="start" style:justify-single-word="false"/>
      <style:text-properties style:font-name="Arial" fo:font-size="12pt" fo:font-weight="bold" officeooo:rsid="001e0359" officeooo:paragraph-rsid="001e0359" style:font-size-asian="12pt" style:font-weight-asian="bold" style:font-size-complex="12pt" style:font-weight-complex="bold"/>
    </style:style>
    <style:style style:name="P12" style:family="paragraph" style:parent-style-name="Text_20_body">
      <style:paragraph-properties fo:line-height="150%" fo:text-align="start" style:justify-single-word="false"/>
      <style:text-properties style:font-name="Arial" fo:font-size="12pt" fo:font-weight="bold" officeooo:paragraph-rsid="0044ed4c" style:font-size-asian="12pt" style:font-weight-asian="bold" style:font-size-complex="12pt" style:font-weight-complex="bold"/>
    </style:style>
    <style:style style:name="P13" style:family="paragraph" style:parent-style-name="Standard">
      <style:paragraph-properties fo:line-height="150%"/>
      <style:text-properties style:font-name="Arial" fo:font-size="12pt" officeooo:rsid="00137b26" officeooo:paragraph-rsid="00137b26" style:font-size-asian="12pt" style:font-size-complex="12pt"/>
    </style:style>
    <style:style style:name="P14" style:family="paragraph" style:parent-style-name="Standard">
      <style:paragraph-properties fo:line-height="150%" fo:text-align="start" style:justify-single-word="false"/>
      <style:text-properties style:font-name="Arial" fo:font-size="12pt" officeooo:paragraph-rsid="00199f49" style:font-size-asian="12pt" style:font-size-complex="12pt"/>
    </style:style>
    <style:style style:name="P15" style:family="paragraph" style:parent-style-name="Standard">
      <style:paragraph-properties fo:line-height="150%" fo:text-align="start" style:justify-single-word="false"/>
      <style:text-properties style:font-name="Arial" fo:font-size="12pt" fo:font-weight="normal" officeooo:rsid="00199f49" officeooo:paragraph-rsid="00199f49" style:font-size-asian="12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Arial" fo:font-size="12pt" fo:font-weight="normal" officeooo:rsid="001b06f3" officeooo:paragraph-rsid="001b06f3" style:font-size-asian="12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Arial" fo:font-size="12pt" fo:font-weight="normal" officeooo:rsid="0018c258" officeooo:paragraph-rsid="0018c258" style:font-size-asian="12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Arial" fo:font-size="12pt" fo:font-weight="normal" officeooo:rsid="001d78bf" officeooo:paragraph-rsid="001d78bf" style:font-size-asian="12pt" style:font-weight-asian="normal" style:font-size-complex="12pt" style:font-weight-complex="normal"/>
    </style:style>
    <style:style style:name="P19" style:family="paragraph" style:parent-style-name="Standard">
      <style:paragraph-properties fo:line-height="150%" fo:text-align="start" style:justify-single-word="false"/>
      <style:text-properties style:font-name="Arial" fo:font-size="12pt" fo:font-weight="normal" officeooo:rsid="001d67b3" officeooo:paragraph-rsid="001d78bf" style:font-size-asian="12pt" style:font-weight-asian="normal" style:font-size-complex="12pt" style:font-weight-complex="normal"/>
    </style:style>
    <style:style style:name="P20" style:family="paragraph" style:parent-style-name="Standard">
      <style:paragraph-properties fo:line-height="150%" fo:text-align="start" style:justify-single-word="false"/>
      <style:text-properties style:font-name="Arial" fo:font-size="12pt" fo:font-weight="normal" officeooo:rsid="002e2741" officeooo:paragraph-rsid="002e2741" style:font-size-asian="12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Arial" fo:font-size="12pt" fo:font-weight="normal" officeooo:rsid="002ece36" officeooo:paragraph-rsid="002e2741" style:font-size-asian="12pt" style:font-weight-asian="normal" style:font-size-complex="12pt" style:font-weight-complex="normal"/>
    </style:style>
    <style:style style:name="P22" style:family="paragraph" style:parent-style-name="Standard">
      <style:paragraph-properties fo:line-height="150%" fo:text-align="start" style:justify-single-word="false"/>
      <style:text-properties style:font-name="Arial" fo:font-size="12pt" fo:font-weight="normal" officeooo:rsid="001c0823" officeooo:paragraph-rsid="001c0823" style:font-size-asian="10.5pt" style:font-weight-asian="normal" style:font-size-complex="12pt" style:font-weight-complex="normal"/>
    </style:style>
    <style:style style:name="P23" style:family="paragraph" style:parent-style-name="Standard">
      <style:paragraph-properties fo:line-height="150%" fo:text-align="start" style:justify-single-word="false"/>
      <style:text-properties style:font-name="Arial" officeooo:paragraph-rsid="0016f176"/>
    </style:style>
    <style:style style:name="P24" style:family="paragraph" style:parent-style-name="Standard">
      <style:paragraph-properties fo:line-height="150%" fo:text-align="start" style:justify-single-word="false"/>
      <style:text-properties style:font-name="Arial" officeooo:paragraph-rsid="0018c258"/>
    </style:style>
    <style:style style:name="P25" style:family="paragraph" style:parent-style-name="Standard">
      <style:paragraph-properties fo:line-height="150%" fo:text-align="start" style:justify-single-word="false"/>
      <style:text-properties style:font-name="Arial" officeooo:paragraph-rsid="002e2741"/>
    </style:style>
    <style:style style:name="P26" style:family="paragraph" style:parent-style-name="Text_20_body">
      <style:paragraph-properties fo:line-height="150%" fo:text-align="start" style:justify-single-word="false"/>
      <style:text-properties style:font-name="Arial"/>
    </style:style>
    <style:style style:name="P27" style:family="paragraph" style:parent-style-name="Standard">
      <style:paragraph-properties fo:line-height="150%" fo:text-align="start" style:justify-single-word="false"/>
      <style:text-properties style:font-name="Arial" fo:font-weight="bold" officeooo:paragraph-rsid="0018c258" style:font-weight-asian="bold" style:font-weight-complex="bold"/>
    </style:style>
    <style:style style:name="P28" style:family="paragraph" style:parent-style-name="Text_20_body">
      <style:paragraph-properties fo:line-height="150%" fo:text-align="start" style:justify-single-word="false"/>
    </style:style>
    <style:style style:name="P29" style:family="paragraph" style:parent-style-name="Text_20_body">
      <style:paragraph-properties fo:line-height="150%" fo:text-align="start" style:justify-single-word="false"/>
      <style:text-properties style:font-name="Arial" fo:font-size="12pt" fo:font-weight="normal" officeooo:rsid="00199f49" officeooo:paragraph-rsid="0044ed4c" style:font-size-asian="12pt" style:font-weight-asian="normal" style:font-size-complex="12pt" style:font-weight-complex="normal"/>
    </style:style>
    <style:style style:name="P30" style:family="paragraph" style:parent-style-name="Standard">
      <style:paragraph-properties fo:line-height="150%"/>
      <style:text-properties style:font-name="Arial" fo:font-size="12pt" fo:font-weight="bold" officeooo:rsid="00137b26" officeooo:paragraph-rsid="00137b26" style:font-size-asian="12pt" style:font-weight-asian="bold" style:font-size-complex="12pt" style:font-weight-complex="bold"/>
    </style:style>
    <style:style style:name="P31" style:family="paragraph" style:parent-style-name="Standard">
      <style:paragraph-properties fo:line-height="150%"/>
      <style:text-properties style:font-name="Arial" fo:font-size="12pt" fo:font-weight="bold" officeooo:rsid="0015077f" officeooo:paragraph-rsid="0015077f" style:font-size-asian="12pt" style:font-weight-asian="bold" style:font-size-complex="12pt" style:font-weight-complex="bold"/>
    </style:style>
    <style:style style:name="P32" style:family="paragraph" style:parent-style-name="Standard">
      <style:paragraph-properties fo:line-height="150%" fo:text-align="start" style:justify-single-word="false"/>
      <style:text-properties style:font-name="Arial" fo:font-size="12pt" fo:font-weight="bold" officeooo:rsid="0015077f" officeooo:paragraph-rsid="0015077f" style:font-size-asian="12pt" style:font-weight-asian="bold" style:font-size-complex="12pt" style:font-weight-complex="bold"/>
    </style:style>
    <style:style style:name="P33" style:family="paragraph" style:parent-style-name="Standard">
      <style:paragraph-properties fo:line-height="150%"/>
      <style:text-properties style:font-name="Arial" fo:font-size="12pt" fo:font-weight="bold" officeooo:rsid="004734b9" officeooo:paragraph-rsid="004734b9" style:font-size-asian="12pt" style:font-weight-asian="bold" style:font-size-complex="12pt" style:font-weight-complex="bold"/>
    </style:style>
    <style:style style:name="P34" style:family="paragraph" style:parent-style-name="Standard">
      <style:paragraph-properties fo:line-height="150%"/>
      <style:text-properties style:font-name="Arial" fo:font-size="12pt" officeooo:rsid="00137b26" officeooo:paragraph-rsid="00137b26" style:font-size-asian="12pt" style:font-size-complex="12pt"/>
    </style:style>
    <style:style style:name="P35" style:family="paragraph" style:parent-style-name="Standard">
      <style:paragraph-properties fo:line-height="150%" fo:text-align="start" style:justify-single-word="false"/>
      <style:text-properties style:font-name="Arial" fo:font-size="12pt" fo:font-weight="normal" officeooo:rsid="0016f176" officeooo:paragraph-rsid="0015077f" style:font-size-asian="12pt" style:font-weight-asian="normal" style:font-size-complex="12pt" style:font-weight-complex="normal"/>
    </style:style>
    <style:style style:name="P36" style:family="paragraph" style:parent-style-name="Standard">
      <style:paragraph-properties fo:line-height="150%" fo:text-align="start" style:justify-single-word="false"/>
      <style:text-properties style:font-name="Arial" fo:font-size="12pt" fo:font-weight="normal" officeooo:rsid="0015077f" officeooo:paragraph-rsid="00473bb7" style:font-size-asian="12pt" style:font-weight-asian="normal" style:font-size-complex="12pt" style:font-weight-complex="normal"/>
    </style:style>
    <style:style style:name="P37" style:family="paragraph" style:parent-style-name="Standard">
      <style:paragraph-properties fo:line-height="150%" fo:text-align="start" style:justify-single-word="false"/>
      <style:text-properties style:font-name="Arial" fo:font-size="12pt" fo:font-weight="normal" officeooo:rsid="00473bb7" officeooo:paragraph-rsid="00473bb7" style:font-size-asian="12pt" style:font-weight-asian="normal" style:font-size-complex="12pt" style:font-weight-complex="normal"/>
    </style:style>
    <style:style style:name="P38" style:family="paragraph" style:parent-style-name="Standard">
      <style:paragraph-properties fo:line-height="150%" fo:text-align="start" style:justify-single-word="false"/>
      <style:text-properties style:font-name="Arial" fo:font-size="12pt" fo:font-weight="normal" officeooo:rsid="002ece36" officeooo:paragraph-rsid="002e2741" style:font-size-asian="12pt" style:font-weight-asian="normal" style:font-size-complex="12pt" style:font-weight-complex="normal"/>
    </style:style>
    <style:style style:name="P39" style:family="paragraph" style:parent-style-name="Standard">
      <style:paragraph-properties fo:line-height="150%" fo:text-align="center" style:justify-single-word="false"/>
      <style:text-properties style:font-name="Arial" fo:font-size="14pt" fo:font-weight="bold" officeooo:rsid="001e0359" officeooo:paragraph-rsid="001e0359" style:font-size-asian="14pt" style:font-weight-asian="bold" style:font-size-complex="14pt" style:font-weight-complex="bold"/>
    </style:style>
    <style:style style:name="T1" style:family="text">
      <style:text-properties officeooo:rsid="0016f176"/>
    </style:style>
    <style:style style:name="T2" style:family="text">
      <style:text-properties fo:font-style="italic" officeooo:rsid="0016f176" style:font-style-asian="italic" style:font-style-complex="italic"/>
    </style:style>
    <style:style style:name="T3" style:family="text">
      <style:text-properties fo:font-style="italic" officeooo:rsid="001b06f3" style:font-style-asian="italic" style:font-style-complex="italic"/>
    </style:style>
    <style:style style:name="T4" style:family="text">
      <style:text-properties fo:font-size="12pt" fo:font-weight="normal" officeooo:rsid="0016f176" style:font-size-asian="12pt" style:font-weight-asian="normal" style:font-size-complex="12pt" style:font-weight-complex="normal"/>
    </style:style>
    <style:style style:name="T5" style:family="text">
      <style:text-properties fo:font-size="12pt" fo:font-weight="normal" officeooo:rsid="002e2741" style:font-size-asian="12pt" style:font-weight-asian="normal" style:font-size-complex="12pt" style:font-weight-complex="normal"/>
    </style:style>
    <style:style style:name="T6" style:family="text">
      <style:text-properties officeooo:rsid="001b06f3"/>
    </style:style>
    <style:style style:name="T7" style:family="text">
      <style:text-properties fo:font-style="normal" officeooo:rsid="001b06f3" style:font-style-asian="normal" style:font-style-complex="normal"/>
    </style:style>
    <style:style style:name="T8" style:family="text">
      <style:text-properties fo:font-style="normal" officeooo:rsid="002530a6" style:font-style-asian="normal" style:font-style-complex="normal"/>
    </style:style>
    <style:style style:name="T9" style:family="text">
      <style:text-properties fo:font-style="normal" officeooo:rsid="00478070" style:font-style-asian="normal" style:font-style-complex="normal"/>
    </style:style>
    <style:style style:name="T10" style:family="text">
      <style:text-properties fo:font-weight="normal" officeooo:rsid="00199f49" style:font-weight-asian="normal" style:font-weight-complex="normal"/>
    </style:style>
    <style:style style:name="T11" style:family="text">
      <style:text-properties fo:font-weight="normal" officeooo:rsid="002530a6" style:font-weight-asian="normal" style:font-weight-complex="normal"/>
    </style:style>
    <style:style style:name="T12" style:family="text">
      <style:text-properties officeooo:rsid="001c0823"/>
    </style:style>
    <style:style style:name="T13" style:family="text">
      <style:text-properties officeooo:rsid="001d67b3"/>
    </style:style>
    <style:style style:name="T14" style:family="text">
      <style:text-properties officeooo:rsid="001d78bf"/>
    </style:style>
    <style:style style:name="T15" style:family="text">
      <style:text-properties officeooo:rsid="001e0359"/>
    </style:style>
    <style:style style:name="T16" style:family="text">
      <style:text-properties officeooo:rsid="002530a6"/>
    </style:style>
    <style:style style:name="T17" style:family="text">
      <style:text-properties fo:font-weight="bold" style:font-weight-asian="bold" style:font-weight-complex="bold"/>
    </style:style>
    <style:style style:name="T18" style:family="text">
      <style:text-properties fo:font-weight="bold" officeooo:rsid="001fedf4" style:font-weight-asian="bold" style:font-weight-complex="bold"/>
    </style:style>
    <style:style style:name="T19" style:family="text">
      <style:text-properties style:font-name="Arial"/>
    </style:style>
    <style:style style:name="T20" style:family="text">
      <style:text-properties officeooo:rsid="00473bb7"/>
    </style:style>
    <style:style style:name="T21" style:family="text">
      <style:text-properties officeooo:rsid="0047807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ri Pengguna ke Pengendali: Transformasi Pola Pikir Saat Beralih ke Linux sebagai Bekal Memasuki Dunia Industri</text:p>
      <text:p text:style-name="P5"/>
      <text:p text:style-name="P5"/>
      <text:p text:style-name="P5"/>
      <text:p text:style-name="P5"><draw:frame draw:style-name="fr1" draw:name="Image1" text:anchor-type="char" svg:x="1.2953in" svg:y="0.1638in" svg:width="3.2937in" svg:height="3.4319in" draw:z-index="0"><draw:image xlink:href="Pictures/10000001000000E1000000E1FD6B92AB.png" xlink:type="simple" xlink:show="embed" xlink:actuate="onLoad" draw:mime-type="image/png"/></draw:frame></text:p>
      <text:p text:style-name="P5"/>
      <text:p text:style-name="P5"/>
      <text:p text:style-name="P5"/>
      <text:p text:style-name="P5"/>
      <text:p text:style-name="P5"/>
      <text:p text:style-name="P5"/>
      <text:p text:style-name="P6"/>
      <text:p text:style-name="P7"/>
      <text:p text:style-name="P7">Ditulis oleh </text:p>
      <text:p text:style-name="P7">Raka Prasetya Hidayat</text:p>
      <text:p text:style-name="P33">12 RPL 2</text:p>
      <text:p text:style-name="P7">102320969</text:p>
      <text:p text:style-name="P13"/>
      <text:p text:style-name="P13"/>
      <text:p text:style-name="P13"/>
      <text:p text:style-name="P13"/>
      <text:p text:style-name="P13"/>
      <text:p text:style-name="P8">Program Studi Rekayasa Perangkat Lunak<text:line-break/>SMK negeri 1 Majalengka</text:p>
      <text:p text:style-name="P8">2026</text:p>
      <text:p text:style-name="P32"><text:soft-page-break/>Pendahuluan</text:p>
      <text:p text:style-name="P37"><text:tab/>Sistem Operasi adalah perangkat lunak yang membuat komputer mampu menjalankan perangakn lunak lainnya. Tanpa sistem operasi komputer tidak akan bisa menjalakan perangkat lunak seperti google chrome, file explorer, atau perangkat lunak perkantoran seperti microsoft word, excel, dan power point. Maka dari itu sistem operasi seperti windows, linux, dan macOS diciptakan untuk memenuhi kebutuhan pengguna komputer </text:p>
      <text:p text:style-name="P36"><text:tab/></text:p>
      <text:p text:style-name="P36"><text:tab/>Dari kalangan pengguna komputer atau laptop umum sistem operasi <text:span text:style-name="T13">l</text:span>inux terbilang rumit untuk penggunaan <text:span text:style-name="T20">sehari hari</text:span>, itu karena linux bukan sistem operasi yang sekali install langsung pakai, namun harus ada beberapa konfigurasi yang dilakukan untuk <text:span text:style-name="T1">menstabilkan linux dalam penggunaan nya. Dan itu menjadi hal dasar yang harus dilakukan jika </text:span><text:span text:style-name="T16">pengguna</text:span><text:span text:style-name="T1"> memasang linux untuk perangkat </text:span><text:span text:style-name="T16">pengguna</text:span><text:span text:style-name="T1"> terutama jika </text:span><text:span text:style-name="T16">pengguna</text:span><text:span text:style-name="T1"> menggunakan arch linux yang memerlukan waktu dan kesabaran hanya untuk membuatnya bisa ber operasi secara normal, karena arch linux perlu mengatur </text:span><text:span text:style-name="T2">disk partition</text:span><text:span text:style-name="T1">, </text:span><text:span text:style-name="T2">memory usage</text:span><text:span text:style-name="T1">, </text:span><text:span text:style-name="T2">wifi connection</text:span><text:span text:style-name="T1">, </text:span><text:span text:style-name="T2">speaker</text:span><text:span text:style-name="T1">, bahkan </text:span><text:span text:style-name="T2">GUI</text:span><text:span text:style-name="T1"> nya secara manual dan bagi pengguna yang hanya ingin pasang dan gunakan tentu ini tidaklah cocok, namun bagi seseorang yang suka bereksperimen dan belajar tentang teknologi hal tadi akan terdengar menyenangkan. </text:span></text:p>
      <text:p text:style-name="P35"/>
      <text:p text:style-name="P23"><text:span text:style-name="T4"><text:tab/></text:span>Dalam konteks dunia industri, pola pikir seperti ini sangat dibutuhkan. Dunia kerja tidak hanya membutuhkan orang yang bisa menggunakan aplikasi, tetapi juga yang memahami cara kerja sistem di baliknya.</text:p>
      <text:p text:style-name="P23"/>
      <text:p text:style-name="P27">Dunia yang Serba Klik</text:p>
      <text:p text:style-name="P24"><text:tab/>Budaya “serba klik” menciptakan jarak antara manusia dan mesin. Sistem dirancang untuk melindungi pengguna dari kerumitan, tetapi secara tidak langsung juga membatasi pemahaman mereka terhadap struktur dan mekanisme di baliknya. Pengguna menjadi konsumen teknologi, bukan pengelola.</text:p>
      <text:p text:style-name="P24"/>
      <text:p text:style-name="P26"><text:tab/>Dalam lingkungan seperti ini, kontrol sepenuhnya berada pada sistem. Pengguna mengikuti alur yang telah disediakan, tanpa banyak ruang untuk <text:soft-page-break/>modifikasi atau eksplorasi. Kenyamanan menjadi prioritas utama, sedangkan pemahaman mendalam bukan lagi kebutuhan.</text:p>
      <text:p text:style-name="P26"><text:tab/>Namun, pertanyaannya adalah apakah kemudahan selalu berarti pemberdayaan? Ataukah justru menciptakan ketergantungan?</text:p>
      <text:p text:style-name="P26"><text:tab/>Peralihan ke Linux sering kali mengguncang kebiasaan ini. Dunia yang sebelumnya dipenuhi ikon dan tombol berubah menjadi terminal dan perintah teks. Dari sinilah transformasi pola pikir dimulai.</text:p>
      <text:p text:style-name="P12">Dari Antarmuka ke Terminal: Masuk ke Ruang Kendali</text:p>
      <text:p text:style-name="P29"><text:tab/>Dengan GUI pengguna bisa mendapatkan kemudahan berinteraksi dengan komputer. Disaat yang bersamaan GUI menyembunyikan kompleksitas cara kerja komputer, ini membuat pengguna tidak perlu tahu proses yang terjadi dibalik GUI tersebut. Dari kebiasaan yang nyaman itu membuat pengguna tidak perlu memahami bagaimana sistem sebenarnya bekerja dengan transparan dan membuat pengguna akan selamanya menjadi pengguna. </text:p>
      <text:p text:style-name="P15"/>
      <text:p text:style-name="P14"><text:span text:style-name="T10"><text:tab/>Microsoft Windows menyediakan kemudahan itu. Dengan menggunakan windows sebagai sistem operasi </text:span><text:span text:style-name="T11">pengguna</text:span><text:span text:style-name="T10"> hanya perlu install dan pakai tanpa perlu tahu proses dibalik GUI. </text:span>Windows dirancang untuk memberikan kenyamanan dan kemudahan bagi pengguna umum</text:p>
      <text:p text:style-name="P15"/>
      <text:p text:style-name="P15"><text:span text:style-name="T6"><text:tab/>Command line sebagai dialog langsung dengan mesin yang membuat kita bisa memerintah mesin melakukan apapun secara langsung tanpa GUI. Sebagai contoh untuk menginstall Node.JS di ubuntu ada perlu mengetik</text:span><text:span text:style-name="T3"> </text:span><text:span text:style-name="T7">sudo apt install nodejs. Ini tidak sama dengan GUI yang serba klik dan tinggal menunggu proses selesai. Dengan modal terminal inilah </text:span><text:span text:style-name="T8">pengguna <text:tab/></text:span><text:span text:style-name="T7"> dapat menjadi pengendali seutuhnya bagi perangkat </text:span><text:span text:style-name="T8">pengguna</text:span><text:span text:style-name="T7"> sendiri dengan segala konsekuensi yang </text:span><text:span text:style-name="T8">pengguna</text:span><text:span text:style-name="T7"> pegang sendiri.</text:span></text:p>
      <text:p text:style-name="P15"><text:span text:style-name="T7"/></text:p>
      <text:p text:style-name="P15"><text:span text:style-name="T7"><text:tab/>Dengan beralih ke linux </text:span><text:span text:style-name="T8">seseorang</text:span><text:span text:style-name="T7"> telah maju satu </text:span><text:span text:style-name="T9">langkah dari pengguna lain</text:span><text:span text:style-name="T7">. Menggunakan linux bukan untuk menjadi keren namun untuk membuat rumah ternyaman di perangkat </text:span><text:span text:style-name="T8">perngguna</text:span><text:span text:style-name="T7">, Dimana </text:span><text:span text:style-name="T8">pengguna</text:span><text:span text:style-name="T7"> </text:span><text:soft-page-break/><text:span text:style-name="T7">menjadi tuan rumah yang bebas mengatur tata letak isi rumah </text:span><text:span text:style-name="T8">pengguna</text:span><text:span text:style-name="T7"> sendiri termasuk sampai titik yang paling detail. Ini tidak bisa dilakukan jika </text:span><text:span text:style-name="T8">pengguna</text:span><text:span text:style-name="T7"> masih bertahan dalam zona nyaman “klik klik”</text:span></text:p>
      <text:p text:style-name="P24"><text:s text:c="8"/></text:p>
      <text:p text:style-name="P16"><text:s/><text:span text:style-name="T17">Menghadapi Error: </text:span><text:span text:style-name="T18">Kesalahan Sebagai Pembelajaran</text:span></text:p>
      <text:p text:style-name="P16"><text:tab/>Dalam penggunaan sehari hari linux error adalah hal umum. Seringkali error tersebut menyangkut perangkat keras <text:span text:style-name="T16">pengguna</text:span> seperti keyboard yang tidak berfungsi atau flashdisk yang tidak terbaca oleh disk management, dengan ini linux memaksa penggunanya untuk memecahkan masalahnya sendiri, <text:span text:style-name="T12">namun setiap error adalah pengalaman dan pengalaman ini membuat penggunanya berpikir secara sistematis untuk menyelesaikan masalah yang ia alami karena setiap pengguna akan memiliki masalah yang berbeda.</text:span></text:p>
      <text:p text:style-name="P16"/>
      <text:p text:style-name="P16"><text:span text:style-name="T12"><text:tab/>Jika </text:span><text:span text:style-name="T16">seseorang</text:span><text:span text:style-name="T12"> terbiasa menggunakan windowsOS atau macOS sebagai sistem operasi maka kemungkinan besar </text:span><text:span text:style-name="T16">pengguna</text:span><text:span text:style-name="T12"> akan panik dan mencari solusi instan. Kebiasaan itu justru akan merusak sistem operasi linux secara perlahan, karena menggunakan linux butuh analisis dan solusi sistematis untuk mendapatkan solusi dari setiap error yang terjadi.</text:span></text:p>
      <text:p text:style-name="P16"/>
      <text:p text:style-name="P16"><text:tab/>Dalam dunia industri, kemampuan menganalisis error sangat penting. Seorang programmer atau system administrator tidak dapat bergantung pada solusi instan. Mereka harus mampu membaca log, memahami penyebab masalah, dan menyelesaikannya tanpa merusak sistem produksi. Pola pikir inilah yang secara tidak langsung dilatih melalui penggunaan Linux.</text:p>
      <text:p text:style-name="P3"/>
      <text:p text:style-name="P9">Kontrol Penuh: Kebebasan dan risiko</text:p>
      <text:p text:style-name="P22"><text:span text:style-name="T13"><text:tab/>Dengan menggunakan linux </text:span><text:span text:style-name="T16">pengguna</text:span><text:span text:style-name="T13"> memilih kebebasan mengatur perangkat yang </text:span><text:span text:style-name="T16">ia</text:span><text:span text:style-name="T13"> miliki baik perangkat keras maupun perangkat lunak. Dan ini menjadikan pengguna linux sebagai Superuser, karena kebasan yang diberikan linux pada penggunanya. </text:span></text:p>
      <text:p text:style-name="P22"/>
      <text:p text:style-name="P22"><text:span text:style-name="T13"><text:tab/>Namun dalam kebebasa</text:span><text:span text:style-name="T15">n</text:span><text:span text:style-name="T13"> itu menuntut kebijaksanaan. Linux tidak serta merta memberikan kebebasan, linux memaksa pengguna untuk </text:span><text:soft-page-break/><text:span text:style-name="T13">mengerti linux itu sendiri sebelum pengguna dapat menikmati kebebasan. Dengan kebebasa</text:span><text:span text:style-name="T15">n</text:span><text:span text:style-name="T13"> yang diberikan </text:span><text:span text:style-name="T16">pengguna</text:span><text:span text:style-name="T13"> dapat mengubah sistem sepenuhnya sesuai keinginan </text:span><text:span text:style-name="T16">pengguna</text:span><text:span text:style-name="T13"> atau justru merusak sistem sepenuhnya. </text:span></text:p>
      <text:p text:style-name="P22"/>
      <text:p text:style-name="P22"><text:tab/>Di lingkungan industri, banyak server dan sistem backend perusahaan menggunakan sistem berbasis Linux karena stabilitas dan fleksibilitasnya. Oleh karena itu, memahami Linux bukan hanya pilihan pribadi, tetapi menjadi nilai tambah profesional bagi calon tenaga kerja di bidang teknologi.</text:p>
      <text:p text:style-name="P17"/>
      <text:p text:style-name="P10">Perubahan Identitas</text:p>
      <text:p text:style-name="P18"><text:tab/>Jika <text:span text:style-name="T16">seseorang</text:span> mulai menggunakan linux <text:span text:style-name="T21">ia </text:span>bukan lagi seorang pengguna software, tapi menjadi bagian dari ekosistem software itu sendiri. Menjadi pengguna linux bukan tentang siapa yang paling keren tapi bagaimana menjadi efisien, karena setiap distro diperuntukan sesuai kebutuhan pengguna linux menjadi solusi bagi seorang pembelajar aktif atau para profesional.</text:p>
      <text:p text:style-name="P18"/>
      <text:p text:style-name="P19"><text:tab/>Kontrol menuntut kedewasaan dan kebebasan tanpa pemahaman adalah kehancuran dalam diam. Linux hadir dengan filosofi </text:p>
      <text:p text:style-name="P19">“<text:span text:style-name="T14">cara berpikir tentang teknologi” </text:span></text:p>
      <text:p text:style-name="P19"/>
      <text:p text:style-name="P18"><text:tab/>Linux tidak memanjakan ia memaksa berpikir. Linux hanya meminta lakukan satu hal dengan baik, dengan transparansi dan kontrol yang diberikan linux membuat pengguna berani mencoba <text:span text:style-name="T15">dan berani salah setiap pengguna linux bisa jadi pembuat dibantu dengan komunitas bukan korporasi.</text:span></text:p>
      <text:p text:style-name="P4"/>
      <text:p text:style-name="P4"><text:s/></text:p>
      <text:p text:style-name="P4"/>
      <text:p text:style-name="P4"/>
      <text:p text:style-name="P4"/>
      <text:p text:style-name="P4"/>
      <text:p text:style-name="P4"><text:soft-page-break/></text:p>
      <text:p text:style-name="P4"/>
      <text:p text:style-name="P11">Kesimpulan: Mengendalikan Sistem, Mengendalikan Diri</text:p>
      <text:p text:style-name="P25"><text:span text:style-name="T5"><text:tab/></text:span>Beralih ke Linux bukan sekadar mengganti sistem operasi, melainkan membentuk pola pikir yang lebih matang dalam memahami teknologi. Proses konfigurasi, menghadapi error, hingga memahami struktur sistem melatih pengguna untuk berpikir sistematis dan bertanggung jawab terhadap setiap keputusan yang diambil.</text:p>
      <text:p text:style-name="P25"/>
      <text:p text:style-name="P26"><text:tab/>Dalam dunia industri, kemampuan tersebut sangat dibutuhkan. Industri tidak hanya mencari individu yang mampu menggunakan perangkat lunak, tetapi juga yang memahami cara kerja sistem dan mampu menyelesaikan masalah secara mandiri.</text:p>
      <text:p text:style-name="P26"/>
      <text:p text:style-name="P26"><text:tab/>Transformasi dari pengguna menjadi pengendali adalah proses pembelajaran yang membentuk karakter profesional. Dengan memahami Linux, seseorang tidak hanya belajar tentang sistem operasi, tetapi juga belajar tentang disiplin, analisis, dan tanggung jawab. Dari sinilah kesiapan memasuki dunia industri benar-benar dimulai.</text:p>
      <text:p text:style-name="P20"/>
      <text:p text:style-name="P20"/>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h text:style-name="P1" text:outline-level="1"><text:span text:style-name="Strong_20_Emphasis"><text:span text:style-name="T19">DAFTAR PUSTAKA</text:span></text:span></text:h>
      <text:p text:style-name="P28"><text:span text:style-name="T19">Linux. (2024). </text:span><text:span text:style-name="Emphasis"><text:span text:style-name="T19">Linux Documentation Project</text:span></text:span><text:span text:style-name="T19">. Diakses dari </text:span><text:a xlink:type="simple" xlink:href="https://www.linux.org/" office:target-frame-name="_new" xlink:show="replace" text:style-name="Internet_20_link" text:visited-style-name="Visited_20_Internet_20_Link"><text:span text:style-name="T19">https://www.linux.org</text:span></text:a></text:p>
      <text:p text:style-name="P28"><text:span text:style-name="T19">Arch Linux. (2024). </text:span><text:span text:style-name="Emphasis"><text:span text:style-name="T19">Arch Linux Wiki</text:span></text:span><text:span text:style-name="T19">. Diakses dari </text:span><text:a xlink:type="simple" xlink:href="https://wiki.archlinux.org/" office:target-frame-name="_new" xlink:show="replace" text:style-name="Internet_20_link" text:visited-style-name="Visited_20_Internet_20_Link"><text:span text:style-name="T19">https://wiki.archlinux.org</text:span></text:a></text:p>
      <text:p text:style-name="P28"><text:span text:style-name="T19">Ubuntu. (2024). </text:span><text:span text:style-name="Emphasis"><text:span text:style-name="T19">Ubuntu Documentation</text:span></text:span><text:span text:style-name="T19">. Diakses dari </text:span><text:a xlink:type="simple" xlink:href="https://help.ubuntu.com/" office:target-frame-name="_new" xlink:show="replace" text:style-name="Internet_20_link" text:visited-style-name="Visited_20_Internet_20_Link"><text:span text:style-name="T19">https://help.ubuntu.com</text:span></text:a></text:p>
      <text:p text:style-name="P28"><text:span text:style-name="T19">Microsoft Windows. (2024). </text:span><text:span text:style-name="Emphasis"><text:span text:style-name="T19">Microsoft Learn Documentation</text:span></text:span><text:span text:style-name="T19">. Diakses dari </text:span><text:a xlink:type="simple" xlink:href="https://learn.microsoft.com/" office:target-frame-name="_new" xlink:show="replace" text:style-name="Internet_20_link" text:visited-style-name="Visited_20_Internet_20_Link"><text:span text:style-name="T19">https://learn.microsoft.com</text:span></text:a></text:p>
      <text:p text:style-name="P28"><text:span text:style-name="T19">macOS. (2024). </text:span><text:span text:style-name="Emphasis"><text:span text:style-name="T19">Apple Developer Documentation</text:span></text:span><text:span text:style-name="T19">. Diakses dari </text:span><text:a xlink:type="simple" xlink:href="https://developer.apple.com/" office:target-frame-name="_new" xlink:show="replace" text:style-name="Internet_20_link" text:visited-style-name="Visited_20_Internet_20_Link"><text:span text:style-name="T19">https://developer.apple.com</text:span></text:a></text:p>
      <text:p text:style-name="P28"><text:span text:style-name="T19">Raymond, Eric S. (2001). </text:span><text:span text:style-name="Emphasis"><text:span text:style-name="T19">The Cathedral and the Bazaar</text:span></text:span><text:span text:style-name="T19">. O’Reilly Media.</text:span></text:p>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text-properties style:font-name="Arial" fo:font-family="Arial" style:font-family-generic="swiss" style:font-pitch="variable" officeooo:rsid="00137b26"/>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3T15:28:56.061490513</meta:creation-date>
    <dc:date>2026-03-06T10:29:13.474822125</dc:date>
    <meta:editing-duration>PT5H59M36S</meta:editing-duration>
    <meta:editing-cycles>11</meta:editing-cycles>
    <meta:generator>LibreOffice/24.2.7.2$Linux_X86_64 LibreOffice_project/420$Build-2</meta:generator>
    <meta:document-statistic meta:table-count="0" meta:image-count="1" meta:object-count="0" meta:page-count="7" meta:paragraph-count="48" meta:word-count="1121" meta:character-count="8503" meta:non-whitespace-character-count="7383"/>
  </office:meta>
</office:document-meta>
</file>