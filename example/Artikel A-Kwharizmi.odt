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start" style:justify-single-word="false"/>
      <style:text-properties style:font-name="Arial" fo:font-weight="bold" style:font-weight-asian="bold" style:font-weight-complex="bold"/>
    </style:style>
    <style:style style:name="P2" style:family="paragraph" style:parent-style-name="Standard">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Text_20_body" style:list-style-name="L1"/>
    <style:style style:name="P4" style:family="paragraph" style:parent-style-name="Text_20_body" style:list-style-name="L3"/>
    <style:style style:name="P5" style:family="paragraph" style:parent-style-name="Text_20_body" style:list-style-name="L6"/>
    <style:style style:name="P6" style:family="paragraph" style:parent-style-name="Text_20_body">
      <style:text-properties style:font-name="Arial" fo:font-size="12pt" fo:font-weight="normal" style:font-size-asian="12pt" style:font-weight-asian="normal" style:font-size-complex="12pt" style:font-weight-complex="normal"/>
    </style:style>
    <style:style style:name="P7" style:family="paragraph" style:parent-style-name="Text_20_body" style:list-style-name="L1">
      <style:text-properties style:font-name="Arial" fo:font-size="12pt" fo:font-weight="normal" style:font-size-asian="12pt" style:font-weight-asian="normal" style:font-size-complex="12pt" style:font-weight-complex="normal"/>
    </style:style>
    <style:style style:name="P8" style:family="paragraph" style:parent-style-name="Text_20_body" style:list-style-name="L2">
      <style:text-properties style:font-name="Arial" fo:font-size="12pt" fo:font-weight="normal" style:font-size-asian="12pt" style:font-weight-asian="normal" style:font-size-complex="12pt" style:font-weight-complex="normal"/>
    </style:style>
    <style:style style:name="P9" style:family="paragraph" style:parent-style-name="Text_20_body" style:list-style-name="L4">
      <style:text-properties style:font-name="Arial" fo:font-size="12pt" fo:font-weight="normal" style:font-size-asian="12pt" style:font-weight-asian="normal" style:font-size-complex="12pt" style:font-weight-complex="normal"/>
    </style:style>
    <style:style style:name="P10" style:family="paragraph" style:parent-style-name="Text_20_body" style:list-style-name="L5">
      <style:text-properties style:font-name="Arial" fo:font-size="12pt" fo:font-weight="normal" style:font-size-asian="12pt" style:font-weight-asian="normal" style:font-size-complex="12pt" style:font-weight-complex="normal"/>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fo:font-weight="bold" style:font-size-asian="12pt" style:font-weight-asian="bold" style:font-size-complex="12pt" style:font-weight-complex="bold"/>
    </style:style>
    <style:style style:name="T4" style:family="text">
      <style:text-properties style:font-name="Arial" fo:font-size="12pt" fo:font-weight="normal"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goritma Al-Khwarizmi: Pondasi di Balik Dunia Pemrograman</text:p>
      <text:p text:style-name="P2"/>
      <text:h text:style-name="P1" text:outline-level="2"><text:span text:style-name="Strong_20_Emphasis"><text:span text:style-name="T6">Pendahuluan</text:span></text:span></text:h>
      <text:h text:style-name="Heading_20_3" text:outline-level="3"><text:span text:style-name="Strong_20_Emphasis"><text:span text:style-name="T3">Latar Belakang</text:span></text:span></text:h>
      <text:p text:style-name="Text_20_body"><text:span text:style-name="T4"><text:tab/>Dunia pemrograman modern saat ini sangat bergantung pada konsep </text:span><text:span text:style-name="Strong_20_Emphasis"><text:span text:style-name="T4">algoritma</text:span></text:span><text:span text:style-name="T4">, yaitu langkah-langkah sistematis yang digunakan untuk menyelesaikan suatu masalah atau menjalankan suatu perintah. Algoritma menjadi inti dari hampir seluruh teknologi digital yang kita gunakan setiap hari, mulai dari aplikasi ponsel, kecerdasan buatan, hingga sistem keamanan data di internet. Tanpa algoritma, komputer hanyalah mesin yang tidak memiliki arah dalam menjalankan prosesnya.</text:span></text:p>
      <text:p text:style-name="Text_20_body"><text:span text:style-name="T4"><text:tab/>Namun, di balik kecanggihan teknologi modern, terdapat jejak pemikiran para ilmuwan masa lampau yang telah merumuskan dasar-dasar logika dan metode berpikir sistematis. Salah satu tokoh penting dalam sejarah ilmu pengetahuan tersebut adalah </text:span><text:span text:style-name="Strong_20_Emphasis"><text:span text:style-name="T4">Muhammad ibn Musa al-Khwarizmi</text:span></text:span><text:span text:style-name="T4">, seorang ilmuwan Muslim yang hidup pada abad ke-9 di </text:span><text:span text:style-name="Strong_20_Emphasis"><text:span text:style-name="T4">Baghdad</text:span></text:span><text:span text:style-name="T4">. Ia dikenal sebagai pelopor dalam pengembangan metode perhitungan sistematis yang kemudian menjadi dasar dari konsep algoritma.</text:span></text:p>
      <text:p text:style-name="P6"><text:tab/>Al-Khwarizmi tidak hanya memberikan kontribusi dalam bidang matematika, tetapi juga memperkenalkan cara berpikir yang terstruktur dan logis dalam menyelesaikan persoalan. Dalam banyak hal, pemikirannya mengajarkan bahwa sebuah masalah yang rumit dapat dipecahkan dengan langkah-langkah yang jelas dan teratur. Cara berpikir inilah yang kemudian menjadi inti dari pemrograman komputer modern.</text:p>
      <text:p text:style-name="Text_20_body"><text:span text:style-name="T4"><text:tab/>Jika kita melihat lebih dalam, pemrograman sebenarnya bukan hanya tentang menulis kode, melainkan tentang </text:span><text:span text:style-name="Strong_20_Emphasis"><text:span text:style-name="T4">menyusun logika berpikir</text:span></text:span><text:span text:style-name="T4">. Dalam konteks ini, algoritma dapat dipahami sebagai jembatan antara pemikiran manusia dan cara kerja mesin. Dengan demikian, gagasan yang dikembangkan oleh Al-Khwarizmi lebih dari sekadar teori matematika; ia merupakan fondasi intelektual yang menghubungkan ilmu pengetahuan masa lalu dengan teknologi masa depan.</text:span></text:p>
      <text:p text:style-name="Text_20_body"><text:span text:style-name="T4"><text:tab/>Artikel ini bertujuan untuk menjelaskan bagaimana pemikiran Al-Khwarizmi mengenai algoritma telah membentuk dasar pemrograman modern serta memberikan pengaruh besar terhadap perkembangan teknologi digital di era sekarang.</text:span></text:p>
      <text:h text:style-name="Heading_20_2" text:outline-level="2"><text:span text:style-name="Strong_20_Emphasis"><text:span text:style-name="T3">Biografi Singkat Al-Khwarizmi</text:span></text:span></text:h>
      <text:p text:style-name="Text_20_body"><text:span text:style-name="Strong_20_Emphasis"><text:span text:style-name="T4"><text:tab/>Muhammad ibn Musa al-Khwarizmi</text:span></text:span><text:span text:style-name="T4"> lahir sekitar tahun 780 M di wilayah Khwarizm, yang kini termasuk wilayah Uzbekistan. Ia kemudian bekerja di </text:span><text:span text:style-name="Strong_20_Emphasis"><text:span text:style-name="T4">Bayt al-Hikmah</text:span></text:span><text:span text:style-name="T4">, sebuah pusat penelitian dan penerjemahan ilmu pengetahuan yang berkembang pesat di </text:span><text:span text:style-name="Strong_20_Emphasis"><text:span text:style-name="T4">Baghdad</text:span></text:span><text:span text:style-name="T4"> pada masa kekhalifahan Abbasiyah.</text:span></text:p>
      <text:p text:style-name="P6"><text:tab/>Baitul Hikmah merupakan tempat berkumpulnya para ilmuwan dari berbagai latar belakang budaya dan ilmu pengetahuan. Di sana, berbagai karya ilmiah dari Yunani, Persia, dan India diterjemahkan serta dikembangkan lebih lanjut. Dalam lingkungan intelektual seperti inilah Al-Khwarizmi mengembangkan pemikirannya.</text:p>
      <text:p text:style-name="Text_20_body"><text:soft-page-break/><text:span text:style-name="T4"><text:tab/>Salah satu karyanya yang paling terkenal adalah </text:span><text:span text:style-name="Strong_20_Emphasis"><text:span text:style-name="T4">Al-Kitab al-Mukhtasar fi Hisab al-Jabr wal-Muqabala</text:span></text:span><text:span text:style-name="T4">, yang membahas metode sistematis dalam menyelesaikan persamaan matematika. Melalui karya tersebut, Al-Khwarizmi tidak hanya memperkenalkan konsep aljabar, tetapi juga menunjukkan bahwa masalah matematika dapat diselesaikan melalui langkah-langkah logis yang teratur.</text:span></text:p>
      <text:p text:style-name="P6"><text:tab/>Pemikiran ini menjadi bukti bahwa ilmu pengetahuan berkembang melalui proses berpikir yang terstruktur. Bagi Al-Khwarizmi, matematika bukan hanya alat hitung, melainkan bahasa logika yang membantu manusia memahami pola-pola dalam dunia.</text:p>
      <text:h text:style-name="Heading_20_2" text:outline-level="2"><text:span text:style-name="Strong_20_Emphasis"><text:span text:style-name="T3">Konsep Algoritma dari Al-Khwarizmi</text:span></text:span></text:h>
      <text:p text:style-name="Text_20_body"><text:span text:style-name="T4"><text:tab/>Salah satu warisan intelektual terbesar dari Al-Khwarizmi adalah konsep </text:span><text:span text:style-name="Strong_20_Emphasis"><text:span text:style-name="T4">algoritma</text:span></text:span><text:span text:style-name="T4">. Algoritma dapat diartikan sebagai serangkaian langkah yang disusun secara sistematis untuk menyelesaikan suatu masalah.</text:span></text:p>
      <text:p text:style-name="P6"><text:tab/>Dalam karya-karyanya, Al-Khwarizmi menunjukkan bahwa persoalan matematika dapat diselesaikan dengan metode yang teratur dan dapat diulang. Pendekatan ini mengubah cara manusia memandang proses pemecahan masalah, dari yang sebelumnya bersifat intuitif menjadi lebih rasional dan sistematis.</text:p>
      <text:p text:style-name="P6">Beberapa karakteristik utama dari pemikiran algoritmik Al-Khwarizmi antara lain:</text:p>
      <text:list text:style-name="L3">
        <text:list-item>
          <text:p text:style-name="P4"><text:span text:style-name="Strong_20_Emphasis"><text:span text:style-name="T4">Sistematis</text:span></text:span><text:span text:style-name="T4">, yaitu setiap langkah dilakukan secara berurutan.</text:span></text:p>
        </text:list-item>
        <text:list-item>
          <text:p text:style-name="P4"><text:span text:style-name="Strong_20_Emphasis"><text:span text:style-name="T4">Logis</text:span></text:span><text:span text:style-name="T4">, yaitu setiap langkah memiliki alasan yang jelas.</text:span></text:p>
        </text:list-item>
        <text:list-item>
          <text:p text:style-name="P4"><text:span text:style-name="Strong_20_Emphasis"><text:span text:style-name="T4">Universal</text:span></text:span><text:span text:style-name="T4">, yaitu metode yang sama dapat diterapkan pada berbagai permasalahan.</text:span></text:p>
        </text:list-item>
      </text:list>
      <text:p text:style-name="Text_20_body"><text:span text:style-name="T4"><text:tab/>Istilah </text:span><text:span text:style-name="Strong_20_Emphasis"><text:span text:style-name="T4">algoritma</text:span></text:span><text:span text:style-name="T4"> sendiri berasal dari pelafalan nama Al-Khwarizmi dalam bahasa Latin, yaitu </text:span><text:span text:style-name="Emphasis"><text:span text:style-name="T4">Algoritmi</text:span></text:span><text:span text:style-name="T4">. Hal ini menunjukkan betapa besar pengaruhnya dalam perkembangan ilmu pengetahuan dunia.</text:span></text:p>
      <text:h text:style-name="Heading_20_2" text:outline-level="2"><text:span text:style-name="Strong_20_Emphasis"><text:span text:style-name="T3">Hubungan Algoritma dengan Pemrograman Modern</text:span></text:span></text:h>
      <text:p text:style-name="Text_20_body"><text:span text:style-name="T4"><text:tab/>Dalam dunia pemrograman, algoritma dapat dianggap sebagai </text:span><text:span text:style-name="Strong_20_Emphasis"><text:span text:style-name="T4">kerangka berpikir sebelum sebuah program dibuat</text:span></text:span><text:span text:style-name="T4">. Seorang programmer biasanya merancang algoritma terlebih dahulu sebelum menuliskan kode dalam bahasa pemrograman.</text:span></text:p>
      <text:p text:style-name="P6">Algoritma membantu programmer untuk:</text:p>
      <text:list text:style-name="L4">
        <text:list-item>
          <text:p text:style-name="P9">menyusun logika program secara terstruktur</text:p>
        </text:list-item>
        <text:list-item>
          <text:p text:style-name="P9">memecahkan masalah secara sistematis</text:p>
        </text:list-item>
        <text:list-item>
          <text:p text:style-name="P9">menghindari kesalahan dalam proses pengolahan data</text:p>
        </text:list-item>
      </text:list>
      <text:p text:style-name="Text_20_body"><text:span text:style-name="T4"><text:tab/>Bahasa pemrograman modern seperti </text:span><text:span text:style-name="Strong_20_Emphasis"><text:span text:style-name="T4">Python</text:span></text:span><text:span text:style-name="T4">, </text:span><text:span text:style-name="Strong_20_Emphasis"><text:span text:style-name="T4">Java</text:span></text:span><text:span text:style-name="T4">, </text:span><text:span text:style-name="Strong_20_Emphasis"><text:span text:style-name="T4">C++</text:span></text:span><text:span text:style-name="T4">, dan </text:span><text:span text:style-name="Strong_20_Emphasis"><text:span text:style-name="T4">JavaScript</text:span></text:span><text:span text:style-name="T4"> pada dasarnya hanyalah alat untuk mengekspresikan algoritma dalam bentuk kode yang dapat dipahami oleh komputer.</text:span></text:p>
      <text:p text:style-name="Text_20_body"><text:span text:style-name="T4"><text:tab/>Dengan kata lain, algoritma adalah </text:span><text:span text:style-name="Strong_20_Emphasis"><text:span text:style-name="T4">pemikiran</text:span></text:span><text:span text:style-name="T4">, sedangkan bahasa pemrograman adalah </text:span><text:span text:style-name="Strong_20_Emphasis"><text:span text:style-name="T4">cara menuliskan pemikiran tersebut</text:span></text:span><text:span text:style-name="T4"> agar dapat dijalankan oleh mesin.</text:span></text:p>
      <text:p text:style-name="P6"><text:soft-page-break/><text:tab/>Sebagai contoh sederhana, ketika membuat program untuk menghitung rata-rata nilai siswa, algoritma menentukan langkah-langkah berikut:</text:p>
      <text:list text:style-name="L5">
        <text:list-item>
          <text:p text:style-name="P10">Mengambil data nilai siswa</text:p>
        </text:list-item>
        <text:list-item>
          <text:p text:style-name="P10">Menjumlahkan seluruh nilai</text:p>
        </text:list-item>
        <text:list-item>
          <text:p text:style-name="P10">Membagi total nilai dengan jumlah siswa</text:p>
        </text:list-item>
        <text:list-item>
          <text:p text:style-name="P10">Menampilkan hasil rata-rata</text:p>
        </text:list-item>
      </text:list>
      <text:p text:style-name="P6"><text:tab/>Urutan langkah tersebut mencerminkan bagaimana manusia menyusun logika sebelum komputer menjalankannya.</text:p>
      <text:h text:style-name="Heading_20_2" text:outline-level="2"><text:span text:style-name="Strong_20_Emphasis"><text:span text:style-name="T3">Pengaruh Al-Khwarizmi dalam Teknologi Digital</text:span></text:span></text:h>
      <text:p text:style-name="P6"><text:tab/>Meskipun hidup lebih dari seribu tahun yang lalu, pemikiran Al-Khwarizmi masih terasa dalam teknologi modern saat ini. Hampir seluruh sistem digital bergantung pada algoritma sebagai dasar prosesnya.</text:p>
      <text:p text:style-name="P6">Beberapa contoh penerapan algoritma dalam teknologi modern antara lain:</text:p>
      <text:list text:style-name="L6">
        <text:list-item>
          <text:p text:style-name="P5"><text:span text:style-name="Strong_20_Emphasis"><text:span text:style-name="T4">Pemrograman komputer</text:span></text:span><text:span text:style-name="T4">, di mana setiap program dibangun dari algoritma tertentu.</text:span></text:p>
        </text:list-item>
        <text:list-item>
          <text:p text:style-name="P5"><text:span text:style-name="Strong_20_Emphasis"><text:span text:style-name="T4">Kecerdasan buatan (Artificial Intelligence)</text:span></text:span><text:span text:style-name="T4">, yang menggunakan algoritma untuk mempelajari pola dari data.</text:span></text:p>
        </text:list-item>
        <text:list-item>
          <text:p text:style-name="P5"><text:span text:style-name="Strong_20_Emphasis"><text:span text:style-name="T4">Keamanan digital</text:span></text:span><text:span text:style-name="T4">, yang menggunakan algoritma kriptografi untuk melindungi informasi.</text:span></text:p>
        </text:list-item>
        <text:list-item>
          <text:p text:style-name="P5"><text:span text:style-name="Strong_20_Emphasis"><text:span text:style-name="T4">Mesin pencari internet</text:span></text:span><text:span text:style-name="T4">, seperti </text:span><text:span text:style-name="Strong_20_Emphasis"><text:span text:style-name="T4">Google Search</text:span></text:span><text:span text:style-name="T4">, yang memanfaatkan algoritma kompleks untuk menentukan hasil pencarian yang paling relevan.</text:span></text:p>
        </text:list-item>
      </text:list>
      <text:p text:style-name="P6">Hal ini menunjukkan bahwa pemikiran Al-Khwarizmi tidak hanya menjadi bagian dari sejarah, tetapi juga terus hidup dalam teknologi yang membentuk kehidupan manusia modern.</text:p>
      <text:h text:style-name="Heading_20_1" text:outline-level="1"><text:span text:style-name="Strong_20_Emphasis"><text:span text:style-name="T3">Kesimpulan</text:span></text:span></text:h>
      <text:p text:style-name="Text_20_body"><text:span text:style-name="Strong_20_Emphasis"><text:span text:style-name="T4"><text:tab/>Muhammad ibn Musa al-Khwarizmi</text:span></text:span><text:span text:style-name="T4"> merupakan salah satu ilmuwan besar dalam sejarah peradaban manusia yang memberikan kontribusi penting dalam bidang matematika dan pemikiran logis. Melalui konsep algoritma yang ia kembangkan, Al-Khwarizmi telah meletakkan dasar bagi cara manusia menyusun solusi terhadap berbagai permasalahan secara sistematis.</text:span></text:p>
      <text:p text:style-name="P6"><text:tab/>Dalam dunia pemrograman modern, algoritma menjadi fondasi utama dalam pembuatan perangkat lunak, kecerdasan buatan, serta berbagai sistem digital yang digunakan saat ini. Hal ini menunjukkan bahwa gagasan yang lahir lebih dari seribu tahun lalu masih memiliki pengaruh yang sangat besar terhadap perkembangan teknologi modern.</text:p>
      <text:p text:style-name="P6"><text:tab/>Lebih dari sekadar metode perhitungan, algoritma juga mencerminkan cara manusia berpikir secara rasional dan terstruktur. Oleh karena itu, mempelajari pemikiran Al-Khwarizmi tidak hanya membantu kita memahami sejarah ilmu pengetahuan, tetapi <text:soft-page-break/>juga mengingatkan bahwa setiap kemajuan teknologi berakar dari kemampuan manusia dalam menyusun logika, memahami pola, dan mencari solusi terhadap berbagai persoalan.</text:p>
      <text:p text:style-name="Text_20_body"><text:span text:style-name="T4"><text:tab/>Dengan demikian, warisan intelektual Al-Khwarizmi menjadi bukti bahwa </text:span><text:span text:style-name="Strong_20_Emphasis"><text:span text:style-name="T4">ilmu pengetahuan tidak hanya membangun teknologi, tetapi juga membentuk cara manusia memahami dunia dan masa depannya</text:span></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6T11:21:02.984873297</meta:creation-date>
    <dc:date>2026-03-06T11:24:42.584002514</dc:date>
    <meta:editing-duration>PT3M40S</meta:editing-duration>
    <meta:editing-cycles>1</meta:editing-cycles>
    <meta:document-statistic meta:table-count="0" meta:image-count="0" meta:object-count="0" meta:page-count="4" meta:paragraph-count="48" meta:word-count="963" meta:character-count="7587" meta:non-whitespace-character-count="6664"/>
    <meta:generator>LibreOffice/24.2.7.2$Linux_X86_64 LibreOffice_project/420$Build-2</meta:generator>
  </office:meta>
</office:document-meta>
</file>